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4.105cm" draw:shadow="visible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082cm" fo:min-width="6cm" draw:shadow="visib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3.082cm" fo:min-width="5.5cm" draw:shadow="visib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3.082cm" fo:min-width="6.002cm" draw:shadow="visib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77cm" fo:min-width="2.962cm" draw:shadow="visibl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77cm" fo:min-width="2.448cm" draw:shadow="visibl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2cm" fo:min-width="7.168cm" draw:shadow="visible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51cm" fo:min-width="1.504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 loext:decorative="false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 draw:shadow="visib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draw:shadow="visible" loext:decorative="false"/>
      <style:paragraph-properties style:writing-mode="lr-tb"/>
    </style:style>
    <style:style style:name="gr12" style:family="graphic" style:parent-style-name="objectwithoutfill">
      <style:graphic-properties draw:marker-end="Arrowheads_20_2" draw:marker-end-width="0.3cm" draw:fill="none" draw:textarea-vertical-align="middle" draw:shadow="visib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loext:graphic-properties draw:fill="none"/>
      <style:paragraph-properties fo:text-align="center"/>
      <style:text-properties fo:font-size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1.27cm" draw:transform="skewX (-0.00314159265358979) rotate (-0.00296705972839131) translate (3.857cm 21.956cm)">
          <text:p text:style-name="P1">Java Virtual Machine - JV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5cm" svg:height="3.332cm" svg:x="1cm" svg:y="24.8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3.332cm" svg:x="7.499cm" svg:y="24.8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02cm" svg:height="3.332cm" svg:x="13.5cm" svg:y="24.81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849cm" svg:height="2.927cm" svg:x="2.588cm" svg:y="25.773cm">
          <draw:text-box>
            <text:p>Windows</text:p>
            <text:p/>
          </draw:text-box>
        </draw:frame>
        <draw:frame draw:style-name="gr6" draw:text-style-name="P2" draw:layer="layout" svg:width="3.277cm" svg:height="2.927cm" svg:x="8.843cm" svg:y="25.773cm">
          <draw:text-box>
            <text:p>MacOS</text:p>
            <text:p/>
          </draw:text-box>
        </draw:frame>
        <draw:frame draw:style-name="gr7" draw:text-style-name="P2" draw:layer="layout" svg:width="7.969cm" svg:height="1.862cm" svg:x="13.351cm" svg:y="25.519cm">
          <draw:text-box>
            <text:p>Linux (Ubuntu, Fedora, </text:p>
            <text:p>CentOS)</text:p>
          </draw:text-box>
        </draw:frame>
        <draw:custom-shape draw:style-name="gr8" draw:text-style-name="P3" draw:layer="layout" svg:width="2.222cm" svg:height="2.269cm" svg:x="1.952cm" svg:y="10.52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3" draw:layer="layout" svg:width="2.222cm" svg:height="2.269cm" svg:x="7.985cm" svg:y="11.16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9" draw:text-style-name="P5" draw:layer="layout" svg:width="2.868cm" svg:height="0.806cm" svg:x="1.952cm" svg:y="9.572cm">
          <draw:text-box>
            <text:p text:style-name="P4">Jiraya.java</text:p>
          </draw:text-box>
        </draw:frame>
        <draw:line draw:style-name="gr10" draw:text-style-name="P6" draw:layer="layout" svg:x1="4.81cm" svg:y1="11.795cm" svg:x2="7.35cm" svg:y2="11.795cm">
          <text:p/>
        </draw:line>
        <draw:frame draw:style-name="gr11" draw:text-style-name="P5" draw:layer="layout" svg:width="3.175cm" svg:height="0.806cm" svg:x="7.667cm" svg:y="9.89cm">
          <draw:text-box>
            <text:p text:style-name="P4">Jiraya.class</text:p>
          </draw:text-box>
        </draw:frame>
        <draw:frame draw:style-name="gr9" draw:text-style-name="P5" draw:layer="layout" svg:width="2.509cm" svg:height="0.806cm" svg:x="10.207cm" svg:y="10.989cm">
          <draw:text-box>
            <text:p text:style-name="P4">bytecode</text:p>
          </draw:text-box>
        </draw:frame>
        <draw:frame draw:style-name="gr9" draw:text-style-name="P7" draw:layer="layout" svg:width="3.004cm" svg:height="0.806cm" svg:x="4.663cm" svg:y="10.671cm">
          <draw:text-box>
            <text:p><text:span text:style-name="T1">compilation</text:span></text:p>
          </draw:text-box>
        </draw:frame>
        <draw:line draw:style-name="gr12" draw:text-style-name="P8" draw:layer="layout" svg:x1="9.255cm" svg:y1="14.017cm" svg:x2="9.255cm" svg:y2="21.002cm">
          <text:p/>
        </draw:line>
        <draw:frame draw:style-name="gr9" draw:text-style-name="P2" draw:layer="layout" svg:width="1.7cm" svg:height="1.673cm" svg:x="14.652cm" svg:y="11.16cm">
          <draw:text-box>
            <text:p>JRE</text:p>
            <text:p/>
          </draw:text-box>
        </draw:frame>
        <draw:frame draw:style-name="gr9" draw:text-style-name="P2" draw:layer="layout" svg:width="1.7cm" svg:height="1.673cm" svg:x="14.652cm" svg:y="12.112cm">
          <draw:text-box>
            <text:p>JDK</text:p>
            <text:p/>
          </draw:text-box>
        </draw:frame>
        <draw:frame draw:style-name="gr9" draw:text-style-name="P2" draw:layer="layout" svg:width="5.43cm" svg:height="0.962cm" svg:x="2.587cm" svg:y="2.27cm">
          <draw:text-box>
            <text:p>How Java Works: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1T11:14:16.966403610</meta:creation-date>
    <dc:date>2026-07-11T11:41:29.235732088</dc:date>
    <meta:editing-duration>PT5M40S</meta:editing-duration>
    <meta:editing-cycles>1</meta:editing-cycles>
    <meta:document-statistic meta:object-count="18"/>
    <meta:generator>LibreOffice/24.2.7.2$Linux_X86_64 LibreOffice_project/420$Build-2</meta:generator>
  </office:meta>
</office:document-meta>
</file>